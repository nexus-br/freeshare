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C4000009C453D8AD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75cm" fo:min-width="18.75cm" loext:decorative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9.75cm" fo:min-width="18.75cm" loext:decorative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9.75cm" fo:min-width="18.5cm" loext:decorative="false"/>
    </style:style>
    <style:style style:name="gr4" style:family="graphic" style:parent-style-name="standard">
      <style:graphic-properties draw:fill="solid" draw:fill-color="#ffffff" draw:textarea-vertical-align="middle" draw:auto-grow-height="false" fo:min-height="8.699cm" fo:min-width="18.75cm" loext:decorative="false"/>
    </style:style>
    <style:style style:name="gr5" style:family="graphic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5.215cm" fo:min-width="18.72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8cm" loext:decorative="false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7cm" fo:min-width="18.75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6.8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ash" svg:stroke-width="0.05cm" svg:stroke-color="#808080" draw:marker-start-width="0.28cm" draw:marker-end-width="0.28cm" draw:fill="none" draw:fill-color="#ffffff" draw:textarea-vertical-align="middle" fo:padding-top="0.15cm" fo:padding-bottom="0.15cm" fo:padding-left="0.275cm" fo:padding-right="0.275cm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withoutfill">
      <style:graphic-properties draw:fill="none" draw:fill-color="#ffffff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Arial Black" fo:font-size="32pt" fo:font-style="normal" fo:text-shadow="none" style:text-underline-style="none" fo:font-weight="normal" style:letter-kerning="true" style:font-name-asian="Arial Black" style:font-size-asian="32pt" style:font-style-asian="normal" style:font-weight-asian="normal" style:font-name-complex="Arial Black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 Black" fo:font-size="32pt" style:font-name-asian="Arial Black" style:font-size-asian="32pt" style:font-name-complex="Arial Black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.25cm" svg:height="6cm" svg:x="0.75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25cm" svg:height="10cm" svg:x="0.75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10cm" svg:x="0.9cm" svg:y="19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25cm" svg:height="8.949cm" svg:x="0.75cm" svg:y="19.7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9.25cm" svg:height="5.5cm" draw:transform="rotate (-3.14159265358979) translate (20cm 7.5cm)">
          <text:p text:style-name="P2"><text:span text:style-name="T1">Dízimos e</text:span></text:p>
          <text:p text:style-name="P2"><text:span text:style-name="T1">Oferta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281.0659186536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6" draw:text-style-name="P1" draw:layer="layout" svg:width="0.501cm" svg:height="0.5cm" draw:transform="rotate (0.785398163397448) translate (9.646cm 1.55cm)">
          <text:p/>
          <draw:enhanced-geometry svg:viewBox="0 0 21600 21600" draw:glue-points="0 0 0 10800 0 21600 10800 21600 21600 21600 10800 10800" draw:text-areas="1900 12700 12700 19700" draw:mirror-vertical="true" draw:mirror-horizontal="false" draw:type="right-triangle" draw:enhanced-path="M 0 0 L 21600 21600 0 21600 0 0 Z N"/>
        </draw:custom-shape>
        <draw:frame draw:style-name="gr7" draw:text-style-name="P6" draw:layer="layout" svg:width="17.5cm" svg:height="8.25cm" svg:x="1.75cm" svg:y="9.75cm">
          <draw:text-box>
            <text:p text:style-name="P4"><text:span text:style-name="T2">“Ministério Profético de</text:span></text:p>
            <text:p text:style-name="P4"><text:span text:style-name="T2"><text:s/>Malaquias 4:5, Apocalipse 10:7</text:span></text:p>
            <text:p text:style-name="P4"><text:span text:style-name="T2">Cumprindo Malaquias 3:10”.</text:span></text:p>
            <text:p text:style-name="P5"><text:span text:style-name="T3">Envelope alternativo by github.com/nexus-br/freeshare</text:span></text:p>
          </draw:text-box>
        </draw:frame>
        <draw:custom-shape draw:style-name="gr8" draw:text-style-name="P1" draw:layer="layout" svg:width="19.25cm" svg:height="8.95cm" svg:x="0.75cm" svg:y="19.75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8.75cm" svg:height="8.882cm" draw:transform="rotate (-3.14159265358979) translate (19.75cm 28.832cm)">
          <draw:text-box>
            <text:p>Igreja Evangélica Crista.</text:p>
            <text:p><text:span text:style-name="T4"/></text:p>
            <text:p>Nome:<text:tab/>_______________________________.</text:p>
            <text:p/>
            <text:p>Data: <text:tab/>________ / __________ / __________.</text:p>
            <text:p/>
            <text:p>Dízimo:<text:tab/>R$ __________ , _____.</text:p>
            <text:p/>
            <text:p text:style-name="P7"><text:span text:style-name="T5">Ofertas:</text:span><text:span text:style-name="T5"><text:tab/></text:span>R$ __________ , _____.</text:p>
            <text:p text:style-name="P7"><text:span text:style-name="T4"/></text:p>
            <text:p text:style-name="P7"><text:span text:style-name="T6">□ </text:span><text:span text:style-name="T7">Dinheiro, <text:s/></text:span><text:span text:style-name="T6">□</text:span><text:span text:style-name="T5"> Pix, </text:span><text:span text:style-name="T6">□</text:span><text:span text:style-name="T5"> Cheque, </text:span><text:span text:style-name="T8">□</text:span> Cartão .</text:p>
            <text:p text:style-name="P7"/>
          </draw:text-box>
        </draw:frame>
        <draw:line draw:style-name="gr10" draw:text-style-name="P8" draw:layer="layout" svg:x1="0cm" svg:y1="19.35cm" svg:x2="21cm" svg:y2="19.35cm">
          <text:p/>
        </draw:line>
        <draw:line draw:style-name="gr10" draw:text-style-name="P8" draw:layer="layout" svg:x1="0cm" svg:y1="8.45cm" svg:x2="21cm" svg:y2="8.45cm">
          <text:p/>
        </draw:line>
        <draw:frame draw:style-name="gr11" draw:text-style-name="P9" draw:layer="layout" svg:width="3cm" svg:height="3cm" svg:x="0.75cm" svg:y="9cm">
          <draw:image xlink:href="Pictures/10000001000009C4000009C453D8AD85.png" xlink:type="simple" xlink:show="embed" xlink:actuate="onLoad" draw:mime-type="image/png">
            <text:p/>
          </draw:image>
        </draw:frame>
        <draw:line draw:style-name="gr12" draw:text-style-name="P8" draw:layer="layout" svg:x1="0cm" svg:y1="0cm" svg:x2="0cm" svg:y2="8.5cm">
          <text:p/>
        </draw:line>
        <draw:line draw:style-name="gr12" draw:text-style-name="P8" draw:layer="layout" svg:x1="21cm" svg:y1="8.45cm" svg:x2="21cm" svg:y2="19.25cm">
          <text:p/>
        </draw:line>
        <draw:line draw:style-name="gr12" draw:text-style-name="P8" draw:layer="layout" svg:x1="21cm" svg:y1="19.35cm" svg:x2="21cm" svg:y2="30.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ogerio batista de souza</meta:initial-creator>
    <meta:creation-date>2026-07-06T13:41:50.609062400</meta:creation-date>
    <dc:date>2026-07-06T14:18:20.433454000</dc:date>
    <dc:creator>rogerio batista de souza</dc:creator>
    <meta:editing-duration>PT21M5S</meta:editing-duration>
    <meta:editing-cycles>7</meta:editing-cycles>
    <meta:generator>LibreOffice/25.2.3.2$Windows_X86_64 LibreOffice_project/bbb074479178df812d175f709636b368952c2ce3</meta:generator>
    <dc:description>envelope basico de dizimo para entregar,
igreja evangelica cristã</dc:description>
    <meta:keyword>envelope</meta:keyword>
    <meta:keyword>a4</meta:keyword>
    <meta:keyword>dízimo</meta:keyword>
    <meta:keyword>impressao laser</meta:keyword>
    <meta:keyword>igreja</meta:keyword>
    <dc:contributor>nexus-br</dc:contributor>
    <dc:coverage>none</dc:coverage>
    <dc:identifier>envelope A4 dizimo, 2026a4env0022</dc:identifier>
    <dc:publisher>none</dc:publisher>
    <dc:relation>none</dc:relation>
    <dc:rights>reservado</dc:rights>
    <dc:source>github.com/nexus-br/freeshare</dc:source>
    <dc:type>envelope imprimivel, printable</dc:type>
    <dc:subject>envelope A4</dc:subject>
    <dc:title>envelope dízimo</dc:title>
    <meta:document-statistic meta:object-count="15"/>
    <meta:user-defined meta:name="Data de gravação" meta:value-type="date">2026-07-06T14:17:00</meta:user-defined>
    <meta:user-defined meta:name="E-mail">roger2011souza@gmail.com</meta:user-defined>
    <meta:user-defined meta:name="Editor">rogerio</meta:user-defined>
  </office:meta>
</office:document-meta>
</file>